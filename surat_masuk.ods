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KIJ CJK" svg:font-family="'UKIJ CJ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mbar1" table:style-name="ta1"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Tanggal</text:p>
          </table:table-cell>
          <table:table-cell office:value-type="string" calcext:value-type="string">
            <text:p>Uraian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Default" office:value-type="string" calcext:value-type="string">
            <text:p>PEDOMAN KALENDER PENDIDIKAN MADRASAH TAHUN AJARAN 2025/2026</text:p>
          </table:table-cell>
          <table:table-cell table:style-name="Default" office:value-type="string" calcext:value-type="string">
            <text:p>https://drive.google.com/drive/folders/1BdJmF0n6GePE6UiB_nz49O56XEvuLjNY?usp=drive_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KIJ CJK" svg:font-family="'UKIJ CJ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UKIJ CJK" style:font-size-asian="10pt" style:language-asian="zh" style:country-asian="CN" style:font-name-complex="DejaVu Sans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KIJ CJK" style:font-family-asian="'UKIJ CJ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0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0T08:20:02.816760347</meta:creation-date>
    <dc:date>2026-05-20T08:25:52.269723388</dc:date>
    <meta:editing-duration>PT5M49S</meta:editing-duration>
    <meta:editing-cycles>3</meta:editing-cycles>
    <meta:generator>LibreOffice/25.2.3.2$Linux_X86_64 LibreOffice_project/520$Build-2</meta:generator>
    <meta:document-statistic meta:table-count="1" meta:cell-count="6" meta:object-count="0"/>
  </office:meta>
</office:document-meta>
</file>